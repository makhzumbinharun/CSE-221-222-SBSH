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27f1" officeooo:paragraph-rsid="000e2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Discount() function that takes one integer parameter (amount) and</text:p>
      <text:p text:style-name="P1">returns 10% discount on amount. If two parameters (amount, discountRate) are</text:p>
      <text:p text:style-name="P1">passed then it returns discount based on the given percentage. Now implement the</text:p>
      <text:p text:style-name="P1">code for the above scenario with function overloading concept.</text:p>
      <text:p text:style-name="P1"/>
      <text:p text:style-name="P1">2. Write the complete code for traversing an array of n element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20T08:43:14.902135641</meta:creation-date>
    <dc:date>2026-05-20T08:45:56.269344385</dc:date>
    <meta:editing-duration>PT2M45S</meta:editing-duration>
    <meta:editing-cycles>1</meta:editing-cycles>
    <meta:document-statistic meta:table-count="0" meta:image-count="0" meta:object-count="0" meta:page-count="1" meta:paragraph-count="5" meta:word-count="57" meta:character-count="360" meta:non-whitespace-character-count="308"/>
    <meta:generator>LibreOffice/6.4.7.2$Linux_X86_64 LibreOffice_project/40$Build-2</meta:generator>
  </office:meta>
</office:document-meta>
</file>